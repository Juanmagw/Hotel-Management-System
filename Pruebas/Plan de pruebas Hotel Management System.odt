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5cm" fo:break-before="auto" fo:break-after="auto" table:align="left" fo:keep-with-next="auto" style:writing-mode="lr-tb"/>
    </style:style>
    <style:style style:name="Tabla2.A" style:family="table-column">
      <style:table-column-properties style:column-width="8.897cm"/>
    </style:style>
    <style:style style:name="Tabla2.B" style:family="table-column">
      <style:table-column-properties style:column-width="3.745cm"/>
    </style:style>
    <style:style style:name="Tabla2.C" style:family="table-column">
      <style:table-column-properties style:column-width="2.358cm"/>
    </style:style>
    <style:style style:name="Tabla2.A1" style:family="table-cell">
      <style:table-cell-properties style:vertical-align="middle" fo:padding-left="0.318cm" fo:padding-right="0.318cm" fo:padding-top="0.212cm" fo:padding-bottom="0.212cm" fo:border="0.05pt solid #c4c7c5"/>
    </style:style>
    <style:style style:name="Tabla1" style:family="table">
      <style:table-properties style:width="15cm" fo:break-before="auto" fo:break-after="auto" table:align="left" fo:keep-with-next="auto" style:writing-mode="lr-tb"/>
    </style:style>
    <style:style style:name="Tabla1.A" style:family="table-column">
      <style:table-column-properties style:column-width="1.302cm"/>
    </style:style>
    <style:style style:name="Tabla1.B" style:family="table-column">
      <style:table-column-properties style:column-width="4.533cm"/>
    </style:style>
    <style:style style:name="Tabla1.C" style:family="table-column">
      <style:table-column-properties style:column-width="4.586cm"/>
    </style:style>
    <style:style style:name="Tabla1.D" style:family="table-column">
      <style:table-column-properties style:column-width="2.452cm"/>
    </style:style>
    <style:style style:name="Tabla1.E" style:family="table-column">
      <style:table-column-properties style:column-width="2.127cm"/>
    </style:style>
    <style:style style:name="Tabla1.A1" style:family="table-cell">
      <style:table-cell-properties style:vertical-align="middle" fo:padding-left="0.318cm" fo:padding-right="0.318cm" fo:padding-top="0.212cm" fo:padding-bottom="0.212cm" fo:border="0.05pt solid #c4c7c5"/>
    </style:style>
    <style:style style:name="Tabla3" style:family="table">
      <style:table-properties style:width="16.626cm" fo:break-before="auto" fo:break-after="auto" table:align="left" fo:keep-with-next="auto" style:writing-mode="lr-tb"/>
    </style:style>
    <style:style style:name="Tabla3.A" style:family="table-column">
      <style:table-column-properties style:column-width="1.247cm"/>
    </style:style>
    <style:style style:name="Tabla3.B" style:family="table-column">
      <style:table-column-properties style:column-width="3.434cm"/>
    </style:style>
    <style:style style:name="Tabla3.C" style:family="table-column">
      <style:table-column-properties style:column-width="2.348cm"/>
    </style:style>
    <style:style style:name="Tabla3.D" style:family="table-column">
      <style:table-column-properties style:column-width="3.759cm"/>
    </style:style>
    <style:style style:name="Tabla3.E" style:family="table-column">
      <style:table-column-properties style:column-width="2.633cm"/>
    </style:style>
    <style:style style:name="Tabla3.F" style:family="table-column">
      <style:table-column-properties style:column-width="3.205cm"/>
    </style:style>
    <style:style style:name="Tabla3.A1" style:family="table-cell">
      <style:table-cell-properties style:vertical-align="middle" fo:padding-left="0.318cm" fo:padding-right="0.318cm" fo:padding-top="0.212cm" fo:padding-bottom="0.212cm" fo:border="0.05pt solid #c4c7c5"/>
    </style:style>
    <style:style style:name="Tabla4" style:family="table">
      <style:table-properties style:width="15cm" fo:break-before="auto" fo:break-after="auto" table:align="left" fo:keep-with-next="auto" style:writing-mode="lr-tb"/>
    </style:style>
    <style:style style:name="Tabla4.A" style:family="table-column">
      <style:table-column-properties style:column-width="1.296cm"/>
    </style:style>
    <style:style style:name="Tabla4.B" style:family="table-column">
      <style:table-column-properties style:column-width="2.085cm"/>
    </style:style>
    <style:style style:name="Tabla4.C" style:family="table-column">
      <style:table-column-properties style:column-width="2.27cm"/>
    </style:style>
    <style:style style:name="Tabla4.D" style:family="table-column">
      <style:table-column-properties style:column-width="1.976cm"/>
    </style:style>
    <style:style style:name="Tabla4.E" style:family="table-column">
      <style:table-column-properties style:column-width="7.373cm"/>
    </style:style>
    <style:style style:name="Tabla4.A1" style:family="table-cell">
      <style:table-cell-properties style:vertical-align="middle" fo:padding-left="0.318cm" fo:padding-right="0.318cm" fo:padding-top="0.212cm" fo:padding-bottom="0.212cm" fo:border="0.05pt solid #c4c7c5"/>
    </style:style>
    <style:style style:name="P1" style:family="paragraph" style:parent-style-name="Title">
      <style:paragraph-properties fo:text-align="center" style:justify-single-word="false"/>
      <style:text-properties style:font-name="Arial1" fo:font-size="36pt" fo:language="en" fo:country="US" officeooo:rsid="001b79c6" officeooo:paragraph-rsid="001b79c6" style:font-size-asian="36pt" style:font-size-complex="36pt"/>
    </style:style>
    <style:style style:name="P2" style:family="paragraph" style:parent-style-name="Standard">
      <style:text-properties style:font-name="Arial1"/>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4.998cm" style:type="right" style:leader-style="dotted" style:leader-text="."/>
        </style:tab-stops>
      </style:paragraph-properties>
    </style:style>
    <style:style style:name="P5" style:family="paragraph" style:parent-style-name="Standard">
      <style:text-properties style:font-name="Arial1" fo:language="en" fo:country="US"/>
    </style:style>
    <style:style style:name="P6" style:family="paragraph" style:parent-style-name="Title" style:list-style-name="L1">
      <style:paragraph-properties fo:margin-top="0cm" fo:margin-bottom="0.141cm" style:contextual-spacing="true" fo:break-before="page"/>
      <style:text-properties style:font-name="Arial1"/>
    </style:style>
    <style:style style:name="P7" style:family="paragraph" style:parent-style-name="Standard" style:list-style-name="">
      <style:paragraph-properties fo:margin-top="0cm" fo:margin-bottom="0.141cm" style:contextual-spacing="true"/>
      <style:text-properties style:font-name="Arial1"/>
    </style:style>
    <style:style style:name="P8" style:family="paragraph" style:parent-style-name="Text_20_body">
      <style:text-properties style:font-name="Arial1"/>
    </style:style>
    <style:style style:name="P9" style:family="paragraph" style:parent-style-name="Title" style:list-style-name="L1">
      <style:text-properties style:font-name="Arial1"/>
    </style:style>
    <style:style style:name="P10" style:family="paragraph" style:parent-style-name="Standard" style:list-style-name="">
      <style:text-properties style:font-name="Arial1"/>
    </style:style>
    <style:style style:name="P11" style:family="paragraph" style:parent-style-name="Heading_20_3">
      <style:text-properties style:font-name="Arial1"/>
    </style:style>
    <style:style style:name="P12" style:family="paragraph" style:parent-style-name="Text_20_body" style:list-style-name="L2"/>
    <style:style style:name="P13" style:family="paragraph" style:parent-style-name="Text_20_body" style:list-style-name="L3">
      <style:text-properties style:font-name="Arial1"/>
    </style:style>
    <style:style style:name="P14" style:family="paragraph" style:parent-style-name="Text_20_body" style:list-style-name="L3"/>
    <style:style style:name="P15" style:family="paragraph" style:parent-style-name="Text_20_body" style:list-style-name="L4">
      <style:text-properties style:font-name="Arial1"/>
    </style:style>
    <style:style style:name="P16" style:family="paragraph" style:parent-style-name="Text_20_body" style:list-style-name="L5">
      <style:text-properties style:font-name="Arial1"/>
    </style:style>
    <style:style style:name="P17" style:family="paragraph" style:parent-style-name="Text_20_body" style:list-style-name="L6"/>
    <style:style style:name="P18" style:family="paragraph" style:parent-style-name="Text_20_body" style:list-style-name="L6">
      <style:text-properties style:font-name="Arial1"/>
    </style:style>
    <style:style style:name="P19" style:family="paragraph" style:parent-style-name="Text_20_body" style:list-style-name="L7">
      <style:text-properties style:font-name="Arial1"/>
    </style:style>
    <style:style style:name="P20" style:family="paragraph" style:parent-style-name="Text_20_body" style:list-style-name="L7"/>
    <style:style style:name="P21" style:family="paragraph" style:parent-style-name="Text_20_body" style:list-style-name="L8">
      <style:text-properties style:font-name="Arial1"/>
    </style:style>
    <style:style style:name="P22" style:family="paragraph" style:parent-style-name="Table_20_Contents">
      <style:text-properties style:font-name="Arial1"/>
    </style:style>
    <style:style style:name="P23" style:family="paragraph" style:parent-style-name="Text_20_body" style:list-style-name="L9"/>
    <style:style style:name="P24" style:family="paragraph" style:parent-style-name="Text_20_body" style:list-style-name="L9">
      <style:text-properties style:font-name="Arial1"/>
    </style:style>
    <style:style style:name="P25" style:family="paragraph" style:parent-style-name="Text_20_body" style:list-style-name="L10">
      <style:text-properties style:font-name="Arial1"/>
    </style:style>
    <style:style style:name="P26" style:family="paragraph" style:parent-style-name="Text_20_body" style:list-style-name="L11">
      <style:text-properties style:font-name="Arial1"/>
    </style:style>
    <style:style style:name="T1" style:family="text">
      <style:text-properties style:font-name="Arial1"/>
    </style:style>
    <style:style style:name="T2" style:family="text">
      <style:text-properties fo:font-weight="bold"/>
    </style:style>
    <style:style style:name="T3" style:family="text">
      <style:text-properties fo:language="en" fo:country="US" officeooo:rsid="0019c74e"/>
    </style:style>
    <style:style style:name="T4" style:family="text">
      <style:text-properties style:font-name="Arial1" fo:font-weight="bold"/>
    </style:style>
    <style:style style:name="T5" style:family="text">
      <style:text-properties fo:language="en" fo:country="US" fo:font-weight="bold" officeooo:rsid="0019c74e"/>
    </style:style>
    <style:style style:name="T6" style:family="text">
      <style:text-properties style:font-name="Arial1" fo:language="en" fo:country="US" officeooo:rsid="0019c74e"/>
    </style:style>
    <style:style style:name="T7" style:family="text">
      <style:text-properties fo:language="en" fo:country="US" officeooo:rsid="0022083f"/>
    </style:style>
    <style:style style:name="T8" style:family="text">
      <style:text-properties fo:color="#1f1f1f" loext:opacity="100%" style:font-name="Arial1" loext:padding="0cm" loext:border="none"/>
    </style:style>
    <style:style style:name="T9" style:family="text">
      <style:text-properties fo:font-variant="normal" fo:text-transform="none" fo:color="#000000" loext:opacity="55%" style:font-name="Arial1" fo:font-size="11.25pt" fo:font-style="normal" fo:font-weight="normal" loext:padding="0cm" loext:border="none"/>
    </style:style>
    <style:style style:name="T10" style:family="text">
      <style:text-properties fo:color="#1f1f1f" loext:opacity="100%" style:font-name="Arial1" fo:font-weight="bold" loext:padding="0cm" loext:border="none"/>
    </style:style>
    <style:style style:name="T11" style:family="text">
      <style:text-properties fo:color="#1f1f1f" loext:opacity="100%" style:font-name="Arial1" fo:font-style="italic" loext:padding="0cm" loext: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de pruebas</text:p>
      <text:p text:style-name="P1">Hotel Management System</text:p>
      <text:p text:style-name="P2">Imagen</text:p>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ice</text:p>
          </text:index-title>
          <text:p text:style-name="P4"><text:a xlink:type="simple" xlink:href="#__RefHeading___Toc516_741802489" office:name="Introducción" text:style-name="Index_20_Link" text:visited-style-name="Index_20_Link">1. Introducción<text:tab/>3</text:a></text:p>
          <text:p text:style-name="P4"><text:a xlink:type="simple" xlink:href="#__RefHeading___Toc520_741802489" office:name="Alcance" text:style-name="Index_20_Link" text:visited-style-name="Index_20_Link">2. Alcance<text:tab/>3</text:a></text:p>
          <text:p text:style-name="P4"><text:a xlink:type="simple" xlink:href="#__RefHeading___Toc522_741802489" office:name="Lo que SE PROBARÁ (In-Scope):" text:style-name="Index_20_Link" text:visited-style-name="Index_20_Link">Lo que SE PROBARÁ (In-Scope):<text:tab/>3</text:a></text:p>
          <text:p text:style-name="P4"><text:a xlink:type="simple" xlink:href="#__RefHeading___Toc524_741802489" office:name="Lo que NO SE PROBARÁ (Out-of-Scope):" text:style-name="Index_20_Link" text:visited-style-name="Index_20_Link">Lo que NO SE PROBARÁ (Out-of-Scope):<text:tab/>3</text:a></text:p>
          <text:p text:style-name="P4"><text:a xlink:type="simple" xlink:href="#__RefHeading___Toc9843_741802489" office:name="Evolución del Alcance (Fase 2 - Frontend)" text:style-name="Index_20_Link" text:visited-style-name="Index_20_Link">Evolución del Alcance (Fase 2 - Frontend)<text:tab/>3</text:a></text:p>
          <text:p text:style-name="P4"><text:a xlink:type="simple" xlink:href="#__RefHeading___Toc526_741802489" office:name="Estrategia" text:style-name="Index_20_Link" text:visited-style-name="Index_20_Link">3. Estrategia<text:tab/>4</text:a></text:p>
          <text:p text:style-name="P4"><text:a xlink:type="simple" xlink:href="#__RefHeading___Toc530_741802489" office:name="Entorno" text:style-name="Index_20_Link" text:visited-style-name="Index_20_Link">4. Entorno<text:tab/>4</text:a></text:p>
          <text:p text:style-name="P4"><text:a xlink:type="simple" xlink:href="#__RefHeading___Toc534_741802489" office:name="Criterios" text:style-name="Index_20_Link" text:visited-style-name="Index_20_Link">5. Criterios<text:tab/>5</text:a></text:p>
          <text:p text:style-name="P4"><text:a xlink:type="simple" xlink:href="#__RefHeading___Toc536_741802489" office:name="Criterios de Entrada (¿Cuándo podemos empezar a probar?):" text:style-name="Index_20_Link" text:visited-style-name="Index_20_Link">Criterios de Entrada (¿Cuándo podemos empezar a probar?):<text:tab/>5</text:a></text:p>
          <text:p text:style-name="P4"><text:a xlink:type="simple" xlink:href="#__RefHeading___Toc538_741802489" office:name="Criterios de Salida (¿Cuándo se da por aprobado el proyecto?):" text:style-name="Index_20_Link" text:visited-style-name="Index_20_Link">Criterios de Salida (¿Cuándo se da por aprobado el proyecto?):<text:tab/>5</text:a></text:p>
          <text:p text:style-name="P4"><text:a xlink:type="simple" xlink:href="#__RefHeading___Toc540_741802489" office:name="Rol" text:style-name="Index_20_Link" text:visited-style-name="Index_20_Link">6. Rol<text:tab/>5</text:a></text:p>
          <text:p text:style-name="P4"><text:a xlink:type="simple" xlink:href="#__RefHeading___Toc544_741802489" office:name="Cronograma" text:style-name="Index_20_Link" text:visited-style-name="Index_20_Link">7. Cronograma<text:tab/>5</text:a></text:p>
          <text:p text:style-name="P4"><text:a xlink:type="simple" xlink:href="#__RefHeading___Toc546_741802489" office:name="Entregables" text:style-name="Index_20_Link" text:visited-style-name="Index_20_Link">8. Entregables<text:tab/>6</text:a></text:p>
          <text:p text:style-name="P4"><text:a xlink:type="simple" xlink:href="#__RefHeading___Toc550_741802489" office:name="Métricas y Condiciones de Aceptación" text:style-name="Index_20_Link" text:visited-style-name="Index_20_Link">9. Métricas y Condiciones de Aceptación<text:tab/>6</text:a></text:p>
          <text:p text:style-name="P4"><text:a xlink:type="simple" xlink:href="#__RefHeading___Toc10471_741802489" office:name="MATRIZ DE CASOS DE PRUEBA (MASTER TEST MATRIX)" text:style-name="Index_20_Link" text:visited-style-name="Index_20_Link">MATRIZ DE CASOS DE PRUEBA (MASTER TEST MATRIX)<text:tab/>6</text:a></text:p>
          <text:p text:style-name="P4"><text:a xlink:type="simple" xlink:href="#__RefHeading___Toc554_741802489" office:name="Fase de Pre-Ejecución (Planificación y Datos)" text:style-name="Index_20_Link" text:visited-style-name="Index_20_Link">Fase de Pre-Ejecución (Planificación y Datos)<text:tab/>7</text:a></text:p>
          <text:p text:style-name="P4"><text:a xlink:type="simple" xlink:href="#__RefHeading___Toc556_741802489" office:name="Fase de Entre-Ejecución (Ejecución y Semáforo de Aceptación)" text:style-name="Index_20_Link" text:visited-style-name="Index_20_Link">Fase de Entre-Ejecución (Ejecución y Semáforo de Aceptación)<text:tab/>7</text:a></text:p>
          <text:p text:style-name="P4"><text:a xlink:type="simple" xlink:href="#__RefHeading___Toc558_741802489" office:name="Fase de Post-Ejecución (Cierre y Gestión de Defectos)" text:style-name="Index_20_Link" text:visited-style-name="Index_20_Link">Fase de Post-Ejecución (Cierre y Gestión de Defectos)<text:tab/>9</text:a></text:p>
        </text:index-body>
      </text:table-of-content>
      <text:p text:style-name="P5"/>
      <text:list text:style-name="L1">
        <text:list-item>
          <text:h text:style-name="P6" text:outline-level="1"><text:bookmark-start text:name="_Toc221098021"/><text:bookmark-start text:name="__RefHeading___Toc516_741802489"/>Introducción<text:bookmark-end text:name="_Toc221098021"/><text:bookmark-end text:name="__RefHeading___Toc516_741802489"/></text:h>
        </text:list-item>
      </text:list>
      <text:h text:style-name="P7" text:outline-level="1"/>
      <text:p text:style-name="P8"><text:bookmark-start text:name="__RefHeading___Toc518_741802489"/>El propósito de este plan de pruebas es garantizar la estabilidad, seguridad y correcto funcionamiento de la API de reserva de hoteles. Se busca validar que la arquitectura en capas (Controllers, Mappers, Services, Repositories) procese la información sin corrupción de datos, que los DTOs filtren la información confidencial de forma efectiva y que las transacciones de la base de datos se ejecuten o reviertan adecuadamente ante fallos.<text:bookmark-end text:name="__RefHeading___Toc518_741802489"/></text:p>
      <text:h text:style-name="P7" text:outline-level="1"/>
      <text:list xml:id="list140508705081141" text:continue-numbering="true" text:style-name="L1">
        <text:list-item>
          <text:h text:style-name="P9" text:outline-level="1"><text:bookmark-start text:name="_Toc221098022"/><text:bookmark-start text:name="__RefHeading___Toc520_741802489"/>Alcance<text:bookmark-end text:name="_Toc221098022"/><text:bookmark-end text:name="__RefHeading___Toc520_741802489"/></text:h>
        </text:list-item>
      </text:list>
      <text:h text:style-name="P10" text:outline-level="1"/>
      <text:h text:style-name="P11" text:outline-level="1"><text:bookmark-start text:name="__RefHeading___Toc522_741802489"/>Lo que SE PROBARÁ (In-Scope):<text:bookmark-end text:name="__RefHeading___Toc522_741802489"/></text:h>
      <text:list text:style-name="L2">
        <text:list-item>
          <text:p text:style-name="P12"><text:span text:style-name="T1">Registro de usuarios e inmunidad de datos sensibles (no exposición de contraseñas mediante </text:span><text:span text:style-name="Source_20_Text"><text:span text:style-name="T1">UserResponseDTO</text:span></text:span><text:span text:style-name="T1">).</text:span></text:p>
        </text:list-item>
        <text:list-item>
          <text:p text:style-name="P12"><text:span text:style-name="T1">Consulta de disponibilidad de habitaciones físicas y actualización de sus estados (</text:span><text:span text:style-name="Source_20_Text"><text:span text:style-name="T1">AVAILABLE</text:span></text:span><text:span text:style-name="T1">, </text:span><text:span text:style-name="Source_20_Text"><text:span text:style-name="T1">OCCUPIED</text:span></text:span><text:span text:style-name="T1">, </text:span><text:span text:style-name="Source_20_Text"><text:span text:style-name="T1">MAINTENANCE</text:span></text:span><text:span text:style-name="T1">).</text:span></text:p>
        </text:list-item>
        <text:list-item>
          <text:p text:style-name="P12"><text:span text:style-name="T1">Flujo completo de reservas: validación de existencia de usuarios/habitaciones, cálculo exacto del precio total en </text:span><text:span text:style-name="Source_20_Text"><text:span text:style-name="T1">BigDecimal</text:span></text:span><text:span text:style-name="T1"> según noches de estadía, y el aislamiento transaccional (</text:span><text:span text:style-name="Source_20_Text"><text:span text:style-name="T1">@Transactional</text:span></text:span><text:span text:style-name="T1">).</text:span></text:p>
        </text:list-item>
      </text:list>
      <text:h text:style-name="P11" text:outline-level="1"><text:bookmark-start text:name="__RefHeading___Toc524_741802489"/>Lo que NO SE PROBARÁ (Out-of-Scope):<text:bookmark-end text:name="__RefHeading___Toc524_741802489"/></text:h>
      <text:list text:style-name="L3">
        <text:list-item>
          <text:p text:style-name="P13">Interfaz gráfica de usuario (Frontend / UI), ya que el proyecto es 100% Backend.</text:p>
        </text:list-item>
        <text:list-item>
          <text:p text:style-name="P14"><text:span text:style-name="T1">Pasarelas de pago externas reales (Stripe/PayPal), se simularán internamente mediante la entidad </text:span><text:span text:style-name="Source_20_Text"><text:span text:style-name="T1">Payment</text:span></text:span><text:span text:style-name="T1">.</text:span></text:p>
        </text:list-item>
        <text:list-item>
          <text:p text:style-name="P13">Seguridad perimetral avanzada (OAuth2/JWT), por no estar implementada aún en esta fase.</text:p>
        </text:list-item>
      </text:list>
      <text:h text:style-name="P11" text:outline-level="1"><text:bookmark-start text:name="__RefHeading___Toc9843_741802489"/>Evolución del Alcance (Fase 2 - Frontend)<text:bookmark-end text:name="__RefHeading___Toc9843_741802489"/></text:h>
      <text:p text:style-name="P8">Este plan se expandirá formalmente cuando se inicie el desarrollo de la capa de presentación (UI). En dicha fase se incluirán:</text:p>
      <text:list text:style-name="L4">
        <text:list-item>
          <text:p text:style-name="P15"><text:span text:style-name="T2">Pruebas de Integración Frontend-Backend:</text:span> Validación de políticas CORS en Spring Boot para permitir peticiones desde el dominio del frontend.</text:p>
        </text:list-item>
        <text:list-item>
          <text:p text:style-name="P15"><text:soft-page-break/><text:span text:style-name="T2">Pruebas de Extremo a Extremo (E2E):</text:span> Automatización de flujos con herramientas como Cypress o Playwright (ej: simular un clic en "Reservar" y verificar que impacte en la pantalla).</text:p>
        </text:list-item>
        <text:list-item>
          <text:p text:style-name="P15"><text:span text:style-name="T2">Validaciones de UI:</text:span> Gestión de formularios, manejo de estados de carga (spinners) y renderizado de errores del servidor en la interfaz.</text:p>
        </text:list-item>
      </text:list>
      <text:h text:style-name="P10" text:outline-level="1"/>
      <text:list xml:id="list140508258461694" text:continue-list="list140508705081141" text:style-name="L1">
        <text:list-item>
          <text:h text:style-name="P9" text:outline-level="1"><text:bookmark-start text:name="_Toc221098023"/><text:bookmark-start text:name="__RefHeading___Toc526_741802489"/>Estrategia<text:bookmark-end text:name="_Toc221098023"/><text:bookmark-end text:name="__RefHeading___Toc526_741802489"/></text:h>
        </text:list-item>
      </text:list>
      <text:h text:style-name="P10" text:outline-level="1"/>
      <text:p text:style-name="P8"><text:bookmark-start text:name="__RefHeading___Toc528_741802489"/>Se aplicará un enfoque de pruebas piramidal dividido en tres niveles:<text:bookmark-end text:name="__RefHeading___Toc528_741802489"/></text:p>
      <text:list text:style-name="L5">
        <text:list-item>
          <text:p text:style-name="P16"><text:span text:style-name="T2">Pruebas Funcionales (Caja Negra):</text:span> Validación de los Endpoints desde la perspectiva del cliente utilizando <text:span text:style-name="T3">EchoApi y Jmeter</text:span>, verificando códigos de estado HTTP (201 Created, 200 OK, 400 Bad Request).</text:p>
        </text:list-item>
        <text:list-item>
          <text:p text:style-name="P16"><text:span text:style-name="T2">Pruebas de Integración:</text:span> Validación de la comunicación entre componentes (Controller -&gt; Mapper -&gt; Service -&gt; DB) asegurando que los datos se guarden correctamente en la base de datos PostgreSQL en Docker.</text:p>
        </text:list-item>
        <text:list-item>
          <text:p text:style-name="P16"><text:span text:style-name="T2">Pruebas de Regresión:</text:span> Re-ejecución de casos de prueba clave tras realizar modificaciones en el código (como la futura implementación del Control de Errores Global) para asegurar que lo ya programado no se rompa.</text:p>
        </text:list-item>
      </text:list>
      <text:h text:style-name="P10" text:outline-level="1"/>
      <text:list xml:id="list140507083577197" text:continue-list="list140508258461694" text:style-name="L1">
        <text:list-item>
          <text:h text:style-name="P9" text:outline-level="1"><text:bookmark-start text:name="_Toc221098024"/><text:bookmark-start text:name="__RefHeading___Toc530_741802489"/>Entorno<text:bookmark-end text:name="_Toc221098024"/><text:bookmark-end text:name="__RefHeading___Toc530_741802489"/></text:h>
        </text:list-item>
      </text:list>
      <text:h text:style-name="P10" text:outline-level="1"/>
      <text:p text:style-name="P8"><text:bookmark-start text:name="__RefHeading___Toc532_741802489"/>Las pruebas se segmentarán en tres fases según el ciclo de vida del software:<text:bookmark-end text:name="__RefHeading___Toc532_741802489"/></text:p>
      <text:list text:style-name="L6">
        <text:list-item>
          <text:p text:style-name="P17"><text:span text:style-name="T4">DEV (Desarrollo Local):</text:span><text:span text:style-name="T1"> Ejecución en la máquina local usando IntelliJ IDEA, base de datos PostgreSQL local en Docker (</text:span><text:span text:style-name="Source_20_Text"><text:span text:style-name="T1">localhost:8080</text:span></text:span><text:span text:style-name="T1">).</text:span></text:p>
        </text:list-item>
        <text:list-item>
          <text:p text:style-name="P18"><text:span text:style-name="T2">CUA (Calidad / QA Aseguramiento):</text:span> Servidor de pruebas aislado donde se despliega la aplicación mediante contenedores Docker para simular un entorno idéntico a producción sin alterar datos reales.</text:p>
        </text:list-item>
        <text:list-item>
          <text:p text:style-name="P18"><text:span text:style-name="T2">PRO (Producción):</text:span> Entorno real de cara al público. Aquí solo se ejecutan pruebas de humo (Smoke Tests) no destructivas tras el despliegue.</text:p>
        </text:list-item>
      </text:list>
      <text:h text:style-name="P10" text:outline-level="1"/>
      <text:list xml:id="list140506713936939" text:continue-list="list140507083577197" text:style-name="L1">
        <text:list-item>
          <text:h text:style-name="P9" text:outline-level="1"><text:bookmark-start text:name="_Toc221098025"/><text:bookmark-start text:name="__RefHeading___Toc534_741802489"/><text:soft-page-break/>Criterios<text:bookmark-end text:name="_Toc221098025"/><text:bookmark-end text:name="__RefHeading___Toc534_741802489"/></text:h>
        </text:list-item>
      </text:list>
      <text:h text:style-name="P10" text:outline-level="1"/>
      <text:h text:style-name="P11" text:outline-level="1"><text:bookmark-start text:name="__RefHeading___Toc536_741802489"/>Criterios de Entrada (¿Cuándo podemos empezar a probar?):<text:bookmark-end text:name="__RefHeading___Toc536_741802489"/></text:h>
      <text:list text:style-name="L7">
        <text:list-item>
          <text:p text:style-name="P19">El código compila al 100% sin errores de Maven o MapStruct.</text:p>
        </text:list-item>
        <text:list-item>
          <text:p text:style-name="P20"><text:span text:style-name="T1">El servidor de Spring Boot levanta limpiamente en el puerto </text:span><text:span text:style-name="Source_20_Text"><text:span text:style-name="T1">8080</text:span></text:span><text:span text:style-name="T1">.</text:span></text:p>
        </text:list-item>
        <text:list-item>
          <text:p text:style-name="P19">Los scripts de la base de datos o el modo automático de Hibernate han creado las tablas correspondientes en PostgreSQL.</text:p>
        </text:list-item>
      </text:list>
      <text:h text:style-name="P11" text:outline-level="1"><text:bookmark-start text:name="__RefHeading___Toc538_741802489"/>Criterios de Salida (¿Cuándo se da por aprobado el proyecto?):<text:bookmark-end text:name="__RefHeading___Toc538_741802489"/></text:h>
      <text:list text:style-name="L8">
        <text:list-item>
          <text:p text:style-name="P21">El 100% de los casos de prueba catalogados como prioridad <text:span text:style-name="T2">ALTA</text:span> han sido ejecutados y finalizados con estado "Exitoso".</text:p>
        </text:list-item>
        <text:list-item>
          <text:p text:style-name="P21">No existen defectos abiertos de criticidad "Bloqueante" o "Crítica".</text:p>
        </text:list-item>
        <text:list-item>
          <text:p text:style-name="P21">Se cumple con las métricas de aceptación de cobertura establecidas.</text:p>
        </text:list-item>
      </text:list>
      <text:h text:style-name="P10" text:outline-level="1"/>
      <text:list text:continue-list="list140506713936939" text:style-name="L1">
        <text:list-item>
          <text:h text:style-name="P9" text:outline-level="1"><text:bookmark-start text:name="_Toc221098026"/><text:bookmark-start text:name="__RefHeading___Toc540_741802489"/>Rol<text:bookmark-end text:name="_Toc221098026"/><text:bookmark-end text:name="__RefHeading___Toc540_741802489"/></text:h>
        </text:list-item>
      </text:list>
      <text:h text:style-name="P10" text:outline-level="1"/>
      <text:p text:style-name="P8"><text:bookmark-start text:name="__RefHeading___Toc542_741802489"/><text:span text:style-name="T2">Rol de Desarrollo (</text:span><text:span text:style-name="T5">Juanma</text:span><text:span text:style-name="T2"> - Dev):</text:span> Responsable de construir los mappers, controladores, corregir los defectos (bugs) reportados en la matriz y asegurar la compilación.<text:bookmark-end text:name="__RefHeading___Toc542_741802489"/></text:p>
      <text:p text:style-name="P8"><text:span text:style-name="T2">Rol de Pruebas (</text:span><text:span text:style-name="T5">Juanma</text:span><text:span text:style-name="T2"> - QA Persona):</text:span> Responsable de diseñar los escenarios en Postman, preparar los datos de prueba, ejecutar las peticiones HTTP, evaluar las respuestas y rellenar la matriz de evidencias.</text:p>
      <text:h text:style-name="P10" text:outline-level="1"/>
      <text:list text:continue-numbering="true" text:style-name="L1">
        <text:list-item>
          <text:h text:style-name="P9" text:outline-level="1"><text:bookmark-start text:name="_Toc221098027"/><text:bookmark-start text:name="__RefHeading___Toc544_741802489"/>Cronograma<text:bookmark-end text:name="_Toc221098027"/><text:bookmark-end text:name="__RefHeading___Toc544_741802489"/></text:h>
        </text:list-item>
      </text:list>
      <text:h text:style-name="P10" text:outline-level="1"/>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Contents"><text:span text:style-name="Strong_20_Emphasis"><text:span text:style-name="T1">Actividad</text:span></text:span></text:p>
            </table:table-cell>
            <table:table-cell table:style-name="Tabla2.A1" office:value-type="string">
              <text:p text:style-name="Table_20_Contents"><text:span text:style-name="Strong_20_Emphasis"><text:span text:style-name="T1">Esfuerzo Estimado</text:span></text:span></text:p>
            </table:table-cell>
            <table:table-cell table:style-name="Tabla2.A1" office:value-type="string">
              <text:p text:style-name="Table_20_Contents"><text:span text:style-name="Strong_20_Emphasis"><text:span text:style-name="T1">Entorno</text:span></text:span></text:p>
            </table:table-cell>
          </table:table-row>
        </table:table-header-rows>
        <table:table-row>
          <table:table-cell table:style-name="Tabla2.A1" office:value-type="string">
            <text:p text:style-name="P22">Preparación de Colecciones de Postman y Datos</text:p>
          </table:table-cell>
          <table:table-cell table:style-name="Tabla2.A1" office:value-type="string">
            <text:p text:style-name="P22"/>
          </table:table-cell>
          <table:table-cell table:style-name="Tabla2.A1" office:value-type="string">
            <text:p text:style-name="P22">DEV</text:p>
          </table:table-cell>
        </table:table-row>
        <text:soft-page-break/>
        <table:table-row>
          <table:table-cell table:style-name="Tabla2.A1" office:value-type="string">
            <text:p text:style-name="P22">Ejecución de Pruebas Funcionales y de Integración</text:p>
          </table:table-cell>
          <table:table-cell table:style-name="Tabla2.A1" office:value-type="string">
            <text:p text:style-name="P22"/>
          </table:table-cell>
          <table:table-cell table:style-name="Tabla2.A1" office:value-type="string">
            <text:p text:style-name="P22">CUA</text:p>
          </table:table-cell>
        </table:table-row>
        <table:table-row>
          <table:table-cell table:style-name="Tabla2.A1" office:value-type="string">
            <text:p text:style-name="P22">Corrección de Defectos Encontrados</text:p>
          </table:table-cell>
          <table:table-cell table:style-name="Tabla2.A1" office:value-type="string">
            <text:p text:style-name="P22"/>
          </table:table-cell>
          <table:table-cell table:style-name="Tabla2.A1" office:value-type="string">
            <text:p text:style-name="P22">DEV</text:p>
          </table:table-cell>
        </table:table-row>
        <table:table-row>
          <table:table-cell table:style-name="Tabla2.A1" office:value-type="string">
            <text:p text:style-name="P22">Pruebas de Regresión Finales</text:p>
          </table:table-cell>
          <table:table-cell table:style-name="Tabla2.A1" office:value-type="string">
            <text:p text:style-name="P22"/>
          </table:table-cell>
          <table:table-cell table:style-name="Tabla2.A1" office:value-type="string">
            <text:p text:style-name="P22">CUA / PRO</text:p>
          </table:table-cell>
        </table:table-row>
      </table:table>
      <text:h text:style-name="P10" text:outline-level="1"/>
      <text:list xml:id="list140507176080203" text:continue-numbering="true" text:style-name="L1">
        <text:list-item>
          <text:h text:style-name="P9" text:outline-level="1"><text:bookmark-start text:name="_Toc221098028"/><text:bookmark-start text:name="__RefHeading___Toc546_741802489"/>Entregables<text:bookmark-end text:name="_Toc221098028"/><text:bookmark-end text:name="__RefHeading___Toc546_741802489"/></text:h>
        </text:list-item>
      </text:list>
      <text:h text:style-name="P10" text:outline-level="1"/>
      <text:p text:style-name="P8"><text:bookmark-start text:name="__RefHeading___Toc548_741802489"/>Matriz de Casos de Prueba (Presentada a continuación).<text:bookmark-end text:name="__RefHeading___Toc548_741802489"/></text:p>
      <text:list text:style-name="L9">
        <text:list-item>
          <text:p text:style-name="P23"><text:span text:style-name="T1">Colección de </text:span><text:span text:style-name="T6">EchoApi</text:span><text:span text:style-name="T1"> (archivo </text:span><text:span text:style-name="Source_20_Text"><text:span text:style-name="T1">.json</text:span></text:span><text:span text:style-name="T1">) con las peticiones configuradas.</text:span></text:p>
        </text:list-item>
        <text:list-item>
          <text:p text:style-name="P24">Informe técnico de cobertura de código.</text:p>
        </text:list-item>
      </text:list>
      <text:p text:style-name="P8"/>
      <text:list text:continue-list="list140507176080203" text:style-name="L1">
        <text:list-item>
          <text:h text:style-name="P9" text:outline-level="1"><text:bookmark-start text:name="_Toc221098029"/><text:bookmark-start text:name="__RefHeading___Toc550_741802489"/>Métricas y Condiciones de Aceptación<text:bookmark-end text:name="_Toc221098029"/><text:bookmark-end text:name="__RefHeading___Toc550_741802489"/></text:h>
        </text:list-item>
      </text:list>
      <text:h text:style-name="P10" text:outline-level="1"/>
      <text:list text:style-name="L10">
        <text:list-item>
          <text:p text:style-name="P25"><text:span text:style-name="T2">Cobertura de Código Mínima:</text:span> Las pruebas unitarias/integración de los Servicios deben cubrir como mínimo el <text:span text:style-name="T2">75%</text:span> de las líneas de código (medido con JaCoCo o la herramienta nativa de IntelliJ).</text:p>
        </text:list-item>
      </text:list>
      <text:list text:style-name="L11">
        <text:list-item>
          <text:p text:style-name="P26"><text:span text:style-name="T2">Tasa de Éxito de Ejecución:</text:span> &gt;<text:span text:style-name="T7">=</text:span> 95% de los casos de prueba totales deben estar en verde.</text:p>
        </text:list-item>
        <text:list-item>
          <text:p text:style-name="P26"><text:span text:style-name="T2">Criterio de Correctitud:</text:span> Toda respuesta HTTP exitosa debe retornar la estructura exacta definida en los ResponseDTOs creados con MapStruct.</text:p>
        </text:list-item>
      </text:list>
      <text:h text:style-name="Heading_20_3" text:outline-level="1"><text:bookmark-start text:name="__RefHeading___Toc10471_741802489"/>MATRIZ DE CASOS DE PRUEBA (MASTER TEST MATRIX)<text:bookmark-end text:name="__RefHeading___Toc10471_741802489"/></text:h>
      <text:h text:style-name="P10" text:outline-level="1"/>
      <text:p text:style-name="P8"><text:bookmark-start text:name="__RefHeading___Toc552_741802489"/><text:soft-page-break/>Para cumplir minuciosamente con tus especificaciones, dividiremos la visualización de la matriz en las tres fases del ciclo de vida del testing: <text:span text:style-name="T2">Pre-Ejecución</text:span>, <text:span text:style-name="T2">Entre-Ejecución (Ejecución en vivo)</text:span> y <text:span text:style-name="T2">Post-Ejecución</text:span>.<text:bookmark-end text:name="__RefHeading___Toc552_741802489"/></text:p>
      <text:h text:style-name="P11" text:outline-level="1"><text:bookmark-start text:name="__RefHeading___Toc554_741802489"/>Fase de Pre-Ejecución (Planificación y Datos)<text:bookmark-end text:name="__RefHeading___Toc554_741802489"/></text:h>
      <text:p text:style-name="P8">Determina qué se necesita tener listo antes de enviar el JSON por el cable de red.</text:p>
      <text:h text:style-name="P10" text:outline-level="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Contents"><text:span text:style-name="Strong_20_Emphasis"><text:span text:style-name="T1">ID Caso</text:span></text:span></text:p>
            </table:table-cell>
            <table:table-cell table:style-name="Tabla1.A1" office:value-type="string">
              <text:p text:style-name="Table_20_Contents"><text:span text:style-name="Strong_20_Emphasis"><text:span text:style-name="T1">Prerrequisitos</text:span></text:span></text:p>
            </table:table-cell>
            <table:table-cell table:style-name="Tabla1.A1" office:value-type="string">
              <text:p text:style-name="Table_20_Contents"><text:span text:style-name="Strong_20_Emphasis"><text:span text:style-name="T1">Datos Específicos para la Prueba</text:span></text:span></text:p>
            </table:table-cell>
            <table:table-cell table:style-name="Tabla1.A1" office:value-type="string">
              <text:p text:style-name="Table_20_Contents"><text:span text:style-name="Strong_20_Emphasis"><text:span text:style-name="T1">Tipo de Prueba</text:span></text:span></text:p>
            </table:table-cell>
            <table:table-cell table:style-name="Tabla1.A1" office:value-type="string">
              <text:p text:style-name="Table_20_Contents"><text:span text:style-name="Strong_20_Emphasis"><text:span text:style-name="T1">Prioridad</text:span></text:span></text:p>
            </table:table-cell>
          </table:table-row>
        </table:table-header-rows>
        <table:table-row>
          <table:table-cell table:style-name="Tabla1.A1" office:value-type="string">
            <text:p text:style-name="P22">TC-001</text:p>
          </table:table-cell>
          <table:table-cell table:style-name="Tabla1.A1" office:value-type="string">
            <text:p text:style-name="Table_20_Contents"><text:span text:style-name="T8">Base de datos limpia y activa. Paquete </text:span><text:span text:style-name="Source_20_Text"><text:span text:style-name="T9">dtos</text:span></text:span><text:span text:style-name="T8"> y </text:span><text:span text:style-name="Source_20_Text"><text:span text:style-name="T9">mappers</text:span></text:span><text:span text:style-name="T8"> compilados.</text:span></text:p>
          </table:table-cell>
          <table:table-cell table:style-name="Tabla1.A1" office:value-type="string">
            <text:p text:style-name="Table_20_Contents"><text:span text:style-name="Source_20_Text"><text:span text:style-name="T9">name</text:span></text:span><text:span text:style-name="T8">: "Alejandro", </text:span><text:span text:style-name="Source_20_Text"><text:span text:style-name="T9">email</text:span></text:span><text:span text:style-name="T8">: "ale@test.com", </text:span><text:span text:style-name="Source_20_Text"><text:span text:style-name="T9">password</text:span></text:span><text:span text:style-name="T8">: "pass123", </text:span><text:span text:style-name="Source_20_Text"><text:span text:style-name="T9">role</text:span></text:span><text:span text:style-name="T8">: "GUEST"</text:span></text:p>
          </table:table-cell>
          <table:table-cell table:style-name="Tabla1.A1" office:value-type="string">
            <text:p text:style-name="P22">Funcional</text:p>
          </table:table-cell>
          <table:table-cell table:style-name="Tabla1.A1" office:value-type="string">
            <text:p text:style-name="P22">ALTA</text:p>
          </table:table-cell>
        </table:table-row>
        <table:table-row>
          <table:table-cell table:style-name="Tabla1.A1" office:value-type="string">
            <text:p text:style-name="P22">TC-002</text:p>
          </table:table-cell>
          <table:table-cell table:style-name="Tabla1.A1" office:value-type="string">
            <text:p text:style-name="Table_20_Contents"><text:span text:style-name="T8">Haber ejecutado el </text:span><text:span text:style-name="T10">TC-001</text:span><text:span text:style-name="T8"> con éxito. Tener una habitación con ID </text:span><text:span text:style-name="Source_20_Text"><text:span text:style-name="T9">1</text:span></text:span><text:span text:style-name="T8"> en estado </text:span><text:span text:style-name="Source_20_Text"><text:span text:style-name="T9">AVAILABLE</text:span></text:span><text:span text:style-name="T8">.</text:span></text:p>
          </table:table-cell>
          <table:table-cell table:style-name="Tabla1.A1" office:value-type="string">
            <text:p text:style-name="Table_20_Contents"><text:span text:style-name="Source_20_Text"><text:span text:style-name="T9">userId</text:span></text:span><text:span text:style-name="T8">: [UUID generado en TC-001], </text:span><text:span text:style-name="Source_20_Text"><text:span text:style-name="T9">roomIds</text:span></text:span><text:span text:style-name="T8">: [1], </text:span><text:span text:style-name="Source_20_Text"><text:span text:style-name="T9">checkInDate</text:span></text:span><text:span text:style-name="T8">: "2026-07-01", </text:span><text:span text:style-name="Source_20_Text"><text:span text:style-name="T9">checkOutDate</text:span></text:span><text:span text:style-name="T8">: "2026-07-05"</text:span></text:p>
          </table:table-cell>
          <table:table-cell table:style-name="Tabla1.A1" office:value-type="string">
            <text:p text:style-name="P22">Integración</text:p>
          </table:table-cell>
          <table:table-cell table:style-name="Tabla1.A1" office:value-type="string">
            <text:p text:style-name="P22">ALTA</text:p>
          </table:table-cell>
        </table:table-row>
        <table:table-row>
          <table:table-cell table:style-name="Tabla1.A1" office:value-type="string">
            <text:p text:style-name="P22">TC-003</text:p>
          </table:table-cell>
          <table:table-cell table:style-name="Tabla1.A1" office:value-type="string">
            <text:p text:style-name="Table_20_Contents"><text:span text:style-name="T8">Haber ejecutado el </text:span><text:span text:style-name="T10">TC-002</text:span><text:span text:style-name="T8">. La habitación ID </text:span><text:span text:style-name="Source_20_Text"><text:span text:style-name="T9">1</text:span></text:span><text:span text:style-name="T8"> ahora está en estado </text:span><text:span text:style-name="Source_20_Text"><text:span text:style-name="T9">OCCUPIED</text:span></text:span><text:span text:style-name="T8">.</text:span></text:p>
          </table:table-cell>
          <table:table-cell table:style-name="Tabla1.A1" office:value-type="string">
            <text:p text:style-name="P22">Mismos datos del <text:span text:style-name="T2">TC-002</text:span> (Intento de duplicar reserva sobre habitación ocupada).</text:p>
          </table:table-cell>
          <table:table-cell table:style-name="Tabla1.A1" office:value-type="string">
            <text:p text:style-name="P22">Funcional / Negocio</text:p>
          </table:table-cell>
          <table:table-cell table:style-name="Tabla1.A1" office:value-type="string">
            <text:p text:style-name="P22">ALTA</text:p>
          </table:table-cell>
        </table:table-row>
        <table:table-row>
          <table:table-cell table:style-name="Tabla1.A1" office:value-type="string">
            <text:p text:style-name="P22">TC-004</text:p>
          </table:table-cell>
          <table:table-cell table:style-name="Tabla1.A1" office:value-type="string">
            <text:p text:style-name="P22">Existencia del usuario del <text:span text:style-name="T2">TC-001</text:span> en la base de datos.</text:p>
          </table:table-cell>
          <table:table-cell table:style-name="Tabla1.A1" office:value-type="string">
            <text:p text:style-name="Table_20_Contents"><text:span text:style-name="T8">ID del usuario (</text:span><text:span text:style-name="Source_20_Text"><text:span text:style-name="T9">UUID</text:span></text:span><text:span text:style-name="T8">) enviado a través de la URL de tipo Path Variable.</text:span></text:p>
          </table:table-cell>
          <table:table-cell table:style-name="Tabla1.A1" office:value-type="string">
            <text:p text:style-name="P22">Regresión</text:p>
          </table:table-cell>
          <table:table-cell table:style-name="Tabla1.A1" office:value-type="string">
            <text:p text:style-name="P22">MEDIA</text:p>
          </table:table-cell>
        </table:table-row>
      </table:table>
      <text:h text:style-name="P11" text:outline-level="1"><text:bookmark-start text:name="__RefHeading___Toc556_741802489"/>Fase de Entre-Ejecución (Ejecución y Semáforo de Aceptación)<text:bookmark-end text:name="__RefHeading___Toc556_741802489"/></text:h>
      <text:p text:style-name="P8">Aquí es donde registramos la interacción con la API y asignamos el color del estado actual.</text:p>
      <text:p text:style-name="P8"><text:soft-page-break/><text:span text:style-name="T2">Guía de Colores:</text:span> 🟢 <text:span text:style-name="T2">Verde:</text:span> Pass (Coincidencia exacta). 🟡 <text:span text:style-name="T2">Amarillo:</text:span> Warning (Funciona pero requiere revisión de formato, logs o rendimiento). 🔴 <text:span text:style-name="T2">Rojo:</text:span> Fail (Error de servidor 500, datos corruptos o quiebre de reglas).</text:p>
      <text:h text:style-name="P10" text:outline-level="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header-rows>
          <table:table-row>
            <table:table-cell table:style-name="Tabla3.A1" office:value-type="string">
              <text:p text:style-name="Table_20_Contents"><text:span text:style-name="Strong_20_Emphasis"><text:span text:style-name="T1">ID Caso</text:span></text:span></text:p>
            </table:table-cell>
            <table:table-cell table:style-name="Tabla3.A1" office:value-type="string">
              <text:p text:style-name="Table_20_Contents"><text:span text:style-name="Strong_20_Emphasis"><text:span text:style-name="T1">Descripción del Escenario</text:span></text:span></text:p>
            </table:table-cell>
            <table:table-cell table:style-name="Tabla3.A1" office:value-type="string">
              <text:p text:style-name="Table_20_Contents"><text:span text:style-name="Strong_20_Emphasis"><text:span text:style-name="T1">Recurso (Endpoint HTTP)</text:span></text:span></text:p>
            </table:table-cell>
            <table:table-cell table:style-name="Tabla3.A1" office:value-type="string">
              <text:p text:style-name="Table_20_Contents"><text:span text:style-name="Strong_20_Emphasis"><text:span text:style-name="T1">Respuesta Esperada</text:span></text:span></text:p>
            </table:table-cell>
            <table:table-cell table:style-name="Tabla3.A1" office:value-type="string">
              <text:p text:style-name="Table_20_Contents"><text:span text:style-name="Strong_20_Emphasis"><text:span text:style-name="T1">Respuesta Obtenida</text:span></text:span></text:p>
            </table:table-cell>
            <table:table-cell table:style-name="Tabla3.A1" office:value-type="string">
              <text:p text:style-name="Table_20_Contents"><text:span text:style-name="Strong_20_Emphasis"><text:span text:style-name="T1">Evidencia e Indicador</text:span></text:span></text:p>
            </table:table-cell>
          </table:table-row>
        </table:table-header-rows>
        <table:table-row>
          <table:table-cell table:style-name="Tabla3.A1" office:value-type="string">
            <text:p text:style-name="P22">TC-001</text:p>
          </table:table-cell>
          <table:table-cell table:style-name="Tabla3.A1" office:value-type="string">
            <text:p text:style-name="P22">Registrar un nuevo usuario de forma válida mediante DTO.</text:p>
          </table:table-cell>
          <table:table-cell table:style-name="Tabla3.A1" office:value-type="string">
            <text:p text:style-name="Table_20_Contents"><text:span text:style-name="Source_20_Text"><text:span text:style-name="T1">POST /api/users</text:span></text:span></text:p>
          </table:table-cell>
          <table:table-cell table:style-name="Tabla3.A1" office:value-type="string">
            <text:p text:style-name="P22">HTTP 201. JSON con ID generado, nombre, email, rol. <text:span text:style-name="T2">Sin passwordHash</text:span>.</text:p>
          </table:table-cell>
          <table:table-cell table:style-name="Tabla3.A1" office:value-type="string">
            <text:p text:style-name="P22">HTTP 201. JSON correcto. Campo password ausente en la respuesta.</text:p>
          </table:table-cell>
          <table:table-cell table:style-name="Tabla3.A1" office:value-type="string">
            <text:p text:style-name="P22">🟢 <text:span text:style-name="T2">VERDE</text:span> (Captura de pantalla Postman guardada).</text:p>
          </table:table-cell>
        </table:table-row>
        <table:table-row>
          <table:table-cell table:style-name="Tabla3.A1" office:value-type="string">
            <text:p text:style-name="P22">TC-002</text:p>
          </table:table-cell>
          <table:table-cell table:style-name="Tabla3.A1" office:value-type="string">
            <text:p text:style-name="P22">Crear reserva exitosa calculando precio automáticamente (4 noches).</text:p>
          </table:table-cell>
          <table:table-cell table:style-name="Tabla3.A1" office:value-type="string">
            <text:p text:style-name="Table_20_Contents"><text:span text:style-name="Source_20_Text"><text:span text:style-name="T1">POST /api/reservations</text:span></text:span></text:p>
          </table:table-cell>
          <table:table-cell table:style-name="Tabla3.A1" office:value-type="string">
            <text:p text:style-name="Table_20_Contents"><text:span text:style-name="T8">HTTP 201. JSON con estado </text:span><text:span text:style-name="Source_20_Text"><text:span text:style-name="T9">PENDING</text:span></text:span><text:span text:style-name="T8"> y el precio calculado automáticamente.</text:span></text:p>
          </table:table-cell>
          <table:table-cell table:style-name="Tabla3.A1" office:value-type="string">
            <text:p text:style-name="Table_20_Contents"><text:span text:style-name="T8">HTTP 201. JSON correcto. Habitaciones cambiadas a </text:span><text:span text:style-name="Source_20_Text"><text:span text:style-name="T9">OCCUPIED</text:span></text:span><text:span text:style-name="T8"> en DB.</text:span></text:p>
          </table:table-cell>
          <table:table-cell table:style-name="Tabla3.A1" office:value-type="string">
            <text:p text:style-name="P22">🟢 <text:span text:style-name="T2">VERDE</text:span> (Verificado en tablas de PostgreSQL).</text:p>
          </table:table-cell>
        </table:table-row>
        <table:table-row>
          <table:table-cell table:style-name="Tabla3.A1" office:value-type="string">
            <text:p text:style-name="P22">TC-003</text:p>
          </table:table-cell>
          <table:table-cell table:style-name="Tabla3.A1" office:value-type="string">
            <text:p text:style-name="P22">Denegar reserva si una de las habitaciones seleccionadas no está disponible.</text:p>
          </table:table-cell>
          <table:table-cell table:style-name="Tabla3.A1" office:value-type="string">
            <text:p text:style-name="Table_20_Contents"><text:span text:style-name="Source_20_Text"><text:span text:style-name="T1">POST /api/reservations</text:span></text:span></text:p>
          </table:table-cell>
          <table:table-cell table:style-name="Tabla3.A1" office:value-type="string">
            <text:p text:style-name="P22">HTTP 400 Bad Request. Mensaje: "Alguna de las habitaciones... no está disponible".</text:p>
          </table:table-cell>
          <table:table-cell table:style-name="Tabla3.A1" office:value-type="string">
            <text:p text:style-name="P22">HTTP 500 Internal Server Error. Mensaje de traza fea de Java en consola.</text:p>
          </table:table-cell>
          <table:table-cell table:style-name="Tabla3.A1" office:value-type="string">
            <text:p text:style-name="P22">🔴 <text:span text:style-name="T2">ROJO</text:span> (La app no maneja el error elegantemente).</text:p>
          </table:table-cell>
        </table:table-row>
        <table:table-row>
          <table:table-cell table:style-name="Tabla3.A1" office:value-type="string">
            <text:p text:style-name="P22">TC<text:soft-page-break/>-004</text:p>
          </table:table-cell>
          <table:table-cell table:style-name="Tabla3.A1" office:value-type="string">
            <text:p text:style-name="P22">Buscar un <text:soft-page-break/>usuario existente por su identificador UUID único.</text:p>
          </table:table-cell>
          <table:table-cell table:style-name="Tabla3.A1" office:value-type="string">
            <text:p text:style-name="Table_20_Contents"><text:span text:style-name="Source_20_Text"><text:span text:style-name="T1">GET </text:span></text:span><text:soft-page-break/><text:span text:style-name="Source_20_Text"><text:span text:style-name="T1">/api/users/{id}</text:span></text:span></text:p>
          </table:table-cell>
          <table:table-cell table:style-name="Tabla3.A1" office:value-type="string">
            <text:p text:style-name="Table_20_Contents"><text:span text:style-name="T8">HTTP 200 OK. </text:span><text:soft-page-break/><text:span text:style-name="T8">JSON con los datos del usuario filtrados por </text:span><text:span text:style-name="Source_20_Text"><text:span text:style-name="T9">UserResponseDTO</text:span></text:span><text:span text:style-name="T8">.</text:span></text:p>
          </table:table-cell>
          <table:table-cell table:style-name="Tabla3.A1" office:value-type="string">
            <text:p text:style-name="Table_20_Contents"><text:span text:style-name="T8">HTTP 200 </text:span><text:soft-page-break/><text:span text:style-name="T8">OK. Muestra los datos pero con un campo extra en </text:span><text:span text:style-name="Source_20_Text"><text:span text:style-name="T9">null</text:span></text:span><text:span text:style-name="T8">.</text:span></text:p>
          </table:table-cell>
          <table:table-cell table:style-name="Tabla3.A1" office:value-type="string">
            <text:p text:style-name="P22">🟡 <text:soft-page-break/><text:span text:style-name="T2">AMARILLO</text:span> (Mapeador de MapStruct requiere ajuste menor).</text:p>
          </table:table-cell>
        </table:table-row>
      </table:table>
      <text:h text:style-name="P11" text:outline-level="1"><text:bookmark-start text:name="__RefHeading___Toc558_741802489"/>Fase de Post-Ejecución (Cierre y Gestión de Defectos)<text:bookmark-end text:name="__RefHeading___Toc558_741802489"/></text:h>
      <text:p text:style-name="P8">Estadísticas finales de la prueba, autoría y el plan de acción en caso de que el semáforo haya marcado rojo.</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header-rows>
          <table:table-row>
            <table:table-cell table:style-name="Tabla4.A1" office:value-type="string">
              <text:p text:style-name="Table_20_Contents"><text:span text:style-name="Strong_20_Emphasis"><text:span text:style-name="T1">ID Caso</text:span></text:span></text:p>
            </table:table-cell>
            <table:table-cell table:style-name="Tabla4.A1" office:value-type="string">
              <text:p text:style-name="Table_20_Contents"><text:span text:style-name="Strong_20_Emphasis"><text:span text:style-name="T1">Estado Final</text:span></text:span></text:p>
            </table:table-cell>
            <table:table-cell table:style-name="Tabla4.A1" office:value-type="string">
              <text:p text:style-name="Table_20_Contents"><text:span text:style-name="Strong_20_Emphasis"><text:span text:style-name="T1">Fecha Ejecución</text:span></text:span></text:p>
            </table:table-cell>
            <table:table-cell table:style-name="Tabla4.A1" office:value-type="string">
              <text:p text:style-name="Table_20_Contents"><text:span text:style-name="Strong_20_Emphasis"><text:span text:style-name="T1">Autor</text:span></text:span></text:p>
            </table:table-cell>
            <table:table-cell table:style-name="Tabla4.A1" office:value-type="string">
              <text:p text:style-name="Table_20_Contents"><text:span text:style-name="Strong_20_Emphasis"><text:span text:style-name="T1">Defectos Detectados / Acciones de Mitigación</text:span></text:span></text:p>
            </table:table-cell>
          </table:table-row>
        </table:table-header-rows>
        <table:table-row>
          <table:table-cell table:style-name="Tabla4.A1" office:value-type="string">
            <text:p text:style-name="P22">TC-001</text:p>
          </table:table-cell>
          <table:table-cell table:style-name="Tabla4.A1" office:value-type="string">
            <text:p text:style-name="P22">EXITOSO</text:p>
          </table:table-cell>
          <table:table-cell table:style-name="Tabla4.A1" office:value-type="string">
            <text:p text:style-name="P22">16/06/2026</text:p>
          </table:table-cell>
          <table:table-cell table:style-name="Tabla4.A1" office:value-type="string">
            <text:p text:style-name="P22">Alejandro</text:p>
          </table:table-cell>
          <table:table-cell table:style-name="Tabla4.A1" office:value-type="string">
            <text:p text:style-name="Table_20_Contents"><text:span text:style-name="T8">Ninguno. El componente </text:span><text:span text:style-name="Source_20_Text"><text:span text:style-name="T9">UserMapper</text:span></text:span><text:span text:style-name="T8"> procesó el DTO limpiamente.</text:span></text:p>
          </table:table-cell>
        </table:table-row>
        <table:table-row>
          <table:table-cell table:style-name="Tabla4.A1" office:value-type="string">
            <text:p text:style-name="P22">TC-002</text:p>
          </table:table-cell>
          <table:table-cell table:style-name="Tabla4.A1" office:value-type="string">
            <text:p text:style-name="P22">EXITOSO</text:p>
          </table:table-cell>
          <table:table-cell table:style-name="Tabla4.A1" office:value-type="string">
            <text:p text:style-name="P22">16/06/2026</text:p>
          </table:table-cell>
          <table:table-cell table:style-name="Tabla4.A1" office:value-type="string">
            <text:p text:style-name="P22">Alejandro</text:p>
          </table:table-cell>
          <table:table-cell table:style-name="Tabla4.A1" office:value-type="string">
            <text:p text:style-name="Table_20_Contents"><text:span text:style-name="T8">Ninguno. </text:span><text:span text:style-name="Source_20_Text"><text:span text:style-name="T9">@Transactional</text:span></text:span><text:span text:style-name="T8"> aseguró la persistencia en cascada.</text:span></text:p>
          </table:table-cell>
        </table:table-row>
        <table:table-row>
          <table:table-cell table:style-name="Tabla4.A1" office:value-type="string">
            <text:p text:style-name="P22">TC-003</text:p>
          </table:table-cell>
          <table:table-cell table:style-name="Tabla4.A1" office:value-type="string">
            <text:p text:style-name="P22">FALLIDO</text:p>
          </table:table-cell>
          <table:table-cell table:style-name="Tabla4.A1" office:value-type="string">
            <text:p text:style-name="P22">16/06/2026</text:p>
          </table:table-cell>
          <table:table-cell table:style-name="Tabla4.A1" office:value-type="string">
            <text:p text:style-name="P22">Alejandro</text:p>
          </table:table-cell>
          <table:table-cell table:style-name="Tabla4.A1" office:value-type="string">
            <text:p text:style-name="Table_20_Contents"><text:span text:style-name="T10">DEF-001:</text:span><text:span text:style-name="T8"> El servicio lanza la excepción correctamente pero el controlador no tiene un capturador global, devolviendo un error 500 en lugar de un 400 limpio. </text:span><text:span text:style-name="T11">Acción:</text:span><text:span text:style-name="T8"> Contactar al desarrollador (Alejandro) para implementar el </text:span><text:span text:style-name="Source_20_Text"><text:span text:style-name="T9">GlobalExceptionHandler</text:span></text:span><text:span text:style-name="T8">.</text:span></text:p>
          </table:table-cell>
        </table:table-row>
        <table:table-row>
          <table:table-cell table:style-name="Tabla4.A1" office:value-type="string">
            <text:p text:style-name="P22">TC<text:soft-page-break/>-004</text:p>
          </table:table-cell>
          <table:table-cell table:style-name="Tabla4.A1" office:value-type="string">
            <text:p text:style-name="P22">EXITO<text:soft-page-break/>SO</text:p>
          </table:table-cell>
          <table:table-cell table:style-name="Tabla4.A1" office:value-type="string">
            <text:p text:style-name="P22">16/06/2<text:soft-page-break/>026</text:p>
          </table:table-cell>
          <table:table-cell table:style-name="Tabla4.A1" office:value-type="string">
            <text:p text:style-name="P22">Alejan<text:soft-page-break/>dro</text:p>
          </table:table-cell>
          <table:table-cell table:style-name="Tabla4.A1" office:value-type="string">
            <text:p text:style-name="P22"><text:span text:style-name="T2">DEF-002:</text:span> Advertencia menor de <text:soft-page-break/>campo vacío. Se solucionó limpiando la caché de compilación de las anotaciones de MapStruct en IntelliJ.</text:p>
          </table:table-cell>
        </table:table-row>
      </table:table>
      <text:h text:style-name="P1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ptos" fo:font-size="12pt" fo:language="es" fo:country="E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1" style:list-style-name="" style:class="chapter">
      <style:paragraph-properties fo:margin-top="0.282cm" fo:margin-bottom="0.141cm" style:contextual-spacing="false" fo:keep-together="always" fo:keep-with-next="always"/>
      <style:text-properties fo:color="#0f4761" loext:opacity="100%" style:font-name="Arial1" fo:font-family="Arial" style:font-family-generic="swiss" style:font-pitch="variable"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fo:language="en" fo:country="US" style:letter-kerning="false" style:font-size-asian="16pt"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style:text-properties fo:font-size="11pt" fo:language="en" fo:country="US" style:letter-kerning="false" style:font-name-asian="Aptos1" style:font-family-asian="Aptos"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fo:font-size="11pt" fo:language="en" fo:country="US" style:letter-kerning="false" style:font-name-asian="Aptos1" style:font-family-asian="Aptos"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style:text-properties fo:font-size="11pt" fo:language="en" fo:country="US" style:letter-kerning="false" style:font-name-asian="Aptos1" style:font-family-asian="Aptos"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uan Manuel Gómez Wals</meta:initial-creator>
    <meta:editing-cycles>11</meta:editing-cycles>
    <meta:creation-date>2026-02-04T10:20:00</meta:creation-date>
    <dc:date>2026-06-16T14:05:06.493047700</dc:date>
    <meta:editing-duration>PT1H3M51S</meta:editing-duration>
    <meta:generator>LibreOffice/26.2.3.2$Windows_X86_64 LibreOffice_project/70e089b17412e4cb7773e41413306b17a2328c34</meta:generator>
    <meta:document-statistic meta:table-count="4" meta:image-count="0" meta:object-count="0" meta:page-count="10" meta:paragraph-count="169" meta:word-count="1438" meta:character-count="9247" meta:non-whitespace-character-count="8013"/>
    <meta:user-defined meta:name="AppVersion">16.0000</meta:user-defined>
    <meta:template xlink:type="simple" xlink:actuate="onRequest" xlink:title="Normal.dotm" xlink:href=""/>
  </office:meta>
</office:document-meta>
</file>